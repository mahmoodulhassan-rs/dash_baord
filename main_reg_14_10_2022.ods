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Total Tests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M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T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U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A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B/FCB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E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CC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ACPU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CPU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BCP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11:04:01.861352583</meta:creation-date>
    <dc:date>2022-10-14T14:32:10.606830328</dc:date>
    <meta:editing-duration>PT2H37M4S</meta:editing-duration>
    <meta:editing-cycles>3</meta:editing-cycles>
    <meta:generator>LibreOffice/7.3.6.2$Linux_X86_64 LibreOffice_project/30$Build-2</meta:generator>
    <meta:document-statistic meta:table-count="1" meta:cell-count="40" meta:object-count="0"/>
  </office:meta>
</office:document-meta>
</file>